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6004EEB4B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f02207105e.png" draw:style-name="gr1" draw:text-style-name="P2" svg:width="4.4996in" svg:height="6.7496in" svg:x="0in" svg:y="0in">
        <draw:image xlink:href="Pictures/1000020100000400000006004EEB4B06.png" xlink:type="simple" xlink:show="embed" xlink:actuate="onLoad">
          <text:p/>
        </draw:image>
      </draw:frame>
      <text:p text:style-name="P1">CR-Touch → Educational Macro-SPM Z-Probe Project (Final Version)</text:p>
      <text:list xml:id="list8337900568757311182" text:style-name="Outline">
        <text:list-item>
          <text:p text:style-name="Heading_20_1">Project Overview</text:p>
        </text:list-item>
      </text:list>
      <text:p text:style-name="Standard">This project converts a Creality CR-Touch auto-leveling sensor into a contact-based Z probe for macro-scale surface scanning. The system demonstrates core principles of scanning probe microscopy (SPM) using low-cost, accessible components. Two probe tip configurations are supported: a rigid steel needle (recommended for stability) and a pogo-pin probe (optional, safer but less precise).</text:p>
      <text:p text:style-name="Standard"><text:soft-page-break/><draw:frame draw:style-name="fr1" text:anchor-type="as-char" svg:width="4.5in" svg:height="6.75in" draw:z-index="1"><draw:image xlink:href="Pictures/1000020100000400000006004EEB4B06.png" xlink:type="simple" xlink:show="embed" xlink:actuate="onLoad"/></draw:frame></text:p>
      <text:p text:style-name="Standard">Figure: System overview (sensor, guide, probe tip, magnet)</text:p>
      <text:list xml:id="list28334075" text:continue-numbering="true" text:style-name="Outline">
        <text:list-item>
          <text:p text:style-name="Heading_20_1">1. Working Principle</text:p>
        </text:list-item>
      </text:list>
      <text:p text:style-name="Standard">The CR-Touch contains a spring-loaded probe and a small internal magnet. A Hall-effect sensor detects magnet displacement and a microcontroller outputs a digital trigger. Replacing the probe tip with a needle or pogo pin converts the device into a precise contact probe. The added external guide improves vertical stability and repeatability.</text:p>
      <text:list xml:id="list28312203" text:continue-numbering="true" text:style-name="Outline">
        <text:list-item>
          <text:p text:style-name="Heading_20_1"><text:soft-page-break/>2. Bill of Materials (BOM)</text:p>
        </text:list-item>
      </text:list>
      <text:p text:style-name="Standard">REQUIRED PARTS:<text:line-break/>- Creality CR-Touch sensor<text:line-break/>- Neodymium magnet 2x2 mm (mandatory, pogo pins are NOT magnetic)<text:line-break/>- PTFE tube 2 mm OD / 1 mm ID<text:line-break/>- M3 screws<text:line-break/><text:line-break/>PROBE OPTIONS:<text:line-break/>Option A (Recommended): Steel needle (~1 mm diameter)<text:line-break/>Option B (Optional): Pogo pin (P50-B1 or P75-B1, spring-loaded, requires glued magnet)<text:line-break/><text:line-break/>3D PRINTED PARTS:<text:line-break/>- CR-Touch mount<text:line-break/>- Guide tube holder<text:line-break/>- Calibration shims</text:p>
      <text:list xml:id="list28315254" text:continue-numbering="true" text:style-name="Outline">
        <text:list-item>
          <text:p text:style-name="Heading_20_1">3. Probe Tip Options (Important Decision)</text:p>
        </text:list-item>
      </text:list>
      <text:p text:style-name="Standard">Steel Needle:<text:line-break/>- High repeatability<text:line-break/>- Single spring system (CR-Touch only)<text:line-break/>- Sharp tip for better spatial resolution<text:line-break/><text:line-break/>Pogo Pin (P50/P75):<text:line-break/>- Built-in spring (safer contact)<text:line-break/>- Requires external magnet attachment<text:line-break/>- Creates double-spring system -&gt; lower measurement precision</text:p>
      <text:list xml:id="list28319827" text:continue-numbering="true" text:style-name="Outline">
        <text:list-item>
          <text:p text:style-name="Heading_20_1">4. CAD and Mechanical Design</text:p>
        </text:list-item>
      </text:list>
      <text:p text:style-name="Standard">- Guide hole: 2.0–2.1 mm<text:line-break/>- Guide length: 10–15 mm<text:line-break/>- Mount must be rigid<text:line-break/>- Probe axis must be perfectly vertical<text:line-break/>- Ensure smooth motion with minimal friction</text:p>
      <text:list xml:id="list28311699" text:continue-numbering="true" text:style-name="Outline">
        <text:list-item>
          <text:p text:style-name="Heading_20_1">5. Assembly Instructions</text:p>
        </text:list-item>
      </text:list>
      <text:p text:style-name="Standard">1. Remove original CR-Touch probe pin<text:line-break/>2. Prepare probe:<text:line-break/> <text:s text:c="2"/>- Needle: cut to ~18 mm<text:line-break/> <text:s text:c="2"/>- Pogo pin: use full length<text:line-break/>3. Glue magnet to top (centered and aligned)<text:line-break/><text:soft-page-break/>4. Insert with original spring<text:line-break/>5. Print and install guide + PTFE tube<text:line-break/>6. Mount to printer using printed mount<text:line-break/>7. Align probe vertically</text:p>
      <text:list xml:id="list28326463" text:continue-numbering="true" text:style-name="Outline">
        <text:list-item>
          <text:p text:style-name="Heading_20_1">6. Testing Procedure</text:p>
        </text:list-item>
      </text:list>
      <text:p text:style-name="Standard">- Power CR-Touch<text:line-break/>- Press probe manually<text:line-break/>- Verify consistent trigger point<text:line-break/>- If unstable: adjust magnet position<text:line-break/>- Ensure smooth motion without sticking</text:p>
      <text:list xml:id="list28305954" text:continue-numbering="true" text:style-name="Outline">
        <text:list-item>
          <text:p text:style-name="Heading_20_1">7. Safety Notes</text:p>
        </text:list-item>
      </text:list>
      <text:p text:style-name="Standard">- Needle tips are sharp → handle carefully<text:line-break/>- Use slow Z movement<text:line-break/>- Avoid hard collisions<text:line-break/>- Keep magnets away from electronics</text:p>
      <text:list xml:id="list28327730" text:continue-numbering="true" text:style-name="Outline">
        <text:list-item>
          <text:p text:style-name="Heading_20_1">8. Summary</text:p>
        </text:list-item>
      </text:list>
      <text:p text:style-name="Standard">This system provides a low-cost, educational Z-probe solution. For best performance use a steel needle. For safer contact a pogo pin can be used, but requires compromises in preci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in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libri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in" fo:margin-bottom="0.0835in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in" fo:margin-bottom="0.0835in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0.75in" fo:margin-right="0in" fo:margin-top="0in" fo:margin-bottom="0.0835in" fo:text-indent="-0.25in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0.75in" fo:margin-right="0in" fo:margin-top="0in" fo:margin-bottom="0.0835in" fo:text-indent="0in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0.65in" fo:margin-right="0.65in" fo:margin-top="0.139in" fo:margin-bottom="0.1945in" fo:text-indent="0in" style:auto-text-indent="false" fo:padding-left="0in" fo:padding-right="0in" fo:padding-top="0in" fo:padding-bottom="0.0555in" fo:border-left="none" fo:border-right="none" fo:border-top="none" fo:border-bottom="0.0071in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35in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er Langenberg</meta:initial-creator>
    <dc:description>generated by python-docx</dc:description>
    <dc:creator>Deler Langenberg</dc:creator>
    <meta:editing-cycles>1</meta:editing-cycles>
    <meta:creation-date>2026-06-10T06:02:25.270</meta:creation-date>
    <dc:date>2026-06-10T06:02:25.270</dc:date>
    <meta:editing-duration>P0D</meta:editing-duration>
    <meta:generator>OpenOffice/4.1.15$Win32 OpenOffice.org_project/4115m2$Build-9813</meta:generator>
    <meta:document-statistic meta:table-count="0" meta:image-count="1" meta:object-count="0" meta:page-count="4" meta:paragraph-count="21" meta:word-count="423" meta:character-count="26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